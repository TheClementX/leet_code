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Linux_Libertine_G_4.ttf" manifest:media-type="application/x-font-ttf"/>
  <manifest:file-entry manifest:full-path="Fonts/Font_Linux_Libertine_G_3.ttf" manifest:media-type="application/x-font-ttf"/>
  <manifest:file-entry manifest:full-path="Fonts/Font_Linux_Libertine_G_2.ttf" manifest:media-type="application/x-font-ttf"/>
  <manifest:file-entry manifest:full-path="Fonts/Font_Linux_Libertine_G_1.ttf" manifest:media-type="application/x-font-ttf"/>
  <manifest:file-entry manifest:full-path="Fonts/Font_Liberation_Sans_4.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office:font-face-decls>
  <office:automatic-styles>
    <style:style style:name="P1" style:family="paragraph" style:parent-style-name="Standard">
      <style:paragraph-properties fo:margin-left="1.5in" fo:margin-right="0in" fo:text-indent="0in" style:auto-text-indent="false"/>
    </style:style>
    <style:style style:name="P2" style:family="paragraph" style:parent-style-name="Standard" style:master-page-name="Standard">
      <style:paragraph-properties fo:margin-left="0in" fo:margin-right="0in" fo:text-indent="0in" style:auto-text-indent="false" style:page-number="1"/>
      <style:text-properties fo:font-size="14pt" style:font-size-asian="14pt" style:font-size-complex="14pt"/>
    </style:style>
    <style:style style:name="P3" style:family="paragraph" style:parent-style-name="Standard">
      <style:paragraph-properties fo:margin-left="0in" fo:margin-right="0in" fo:text-indent="0in" style:auto-text-indent="false"/>
      <style:text-properties fo:font-size="14pt" style:font-size-asian="14pt" style:font-size-complex="14pt"/>
    </style:style>
    <style:style style:name="P4" style:family="paragraph" style:parent-style-name="Standard">
      <style:text-properties fo:font-size="14pt" style:font-size-asian="14pt" style:font-size-complex="14pt"/>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1">
      <style:paragraph-properties fo:margin-left="1in" fo:margin-right="0in" fo:text-indent="-0.25in" style:auto-text-indent="false"/>
    </style:style>
    <style:style style:name="P7" style:family="paragraph" style:parent-style-name="Standard" style:list-style-name="WWNum1">
      <style:paragraph-properties fo:margin-left="1.5in" fo:margin-right="0in" fo:text-indent="-0.25in" style:auto-text-indent="false"/>
    </style:style>
    <style:style style:name="P8" style:family="paragraph" style:parent-style-name="Standard" style:list-style-name="WWNum1">
      <style:paragraph-properties fo:margin-left="2in" fo:margin-right="0in" fo:text-indent="-0.25in" style:auto-text-indent="false"/>
    </style:style>
    <style:style style:name="P9" style:family="paragraph" style:parent-style-name="Standard" style:list-style-name="WWNum1">
      <style:paragraph-properties fo:margin-left="0.5in" fo:margin-right="0in" fo:text-indent="-0.25in" style:auto-text-indent="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WWNum1">
      <style:paragraph-properties fo:margin-left="1.5in" fo:margin-right="0in" fo:text-indent="-0.25in" style:auto-text-indent="false"/>
      <style:text-properties style:text-underline-style="none"/>
    </style:style>
    <style:style style:name="P11" style:family="paragraph" style:parent-style-name="Standard" style:list-style-name="WWNum3">
      <style:paragraph-properties fo:margin-left="0.5in" fo:margin-right="0in" fo:text-indent="-0.25in" style:auto-text-indent="false"/>
    </style:style>
    <style:style style:name="P12" style:family="paragraph" style:parent-style-name="Standard" style:list-style-name="WWNum3">
      <style:paragraph-properties fo:margin-left="1in" fo:margin-right="0in" fo:text-indent="-0.25in" style:auto-text-indent="false"/>
    </style:style>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master-page-name="">
      <loext:graphic-properties draw:fill="none"/>
      <style:paragraph-properties fo:margin-left="0in" fo:margin-right="0in" fo:line-height="115%" fo:text-indent="-0.25in" style:auto-text-indent="false" style:page-number="auto" fo:background-color="transparent"/>
      <style:text-properties officeooo:rsid="0014a61c" officeooo:paragraph-rsid="0014a61c"/>
    </style:style>
    <style:style style:name="P15" style:family="paragraph" style:parent-style-name="Standard">
      <loext:graphic-properties draw:fill="none"/>
      <style:paragraph-properties fo:margin-left="0in" fo:margin-right="0in" fo:line-height="115%" fo:text-indent="-0.25in" style:auto-text-indent="false" fo:background-color="transparent"/>
      <style:text-properties officeooo:rsid="0014a61c" officeooo:paragraph-rsid="0014a61c"/>
    </style:style>
    <style:style style:name="T1"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OLUTIONS</text:p>
      <text:list text:style-name="WWNum1">
        <text:list-item>
          <text:p text:style-name="P9">merge sorted array 1</text:p>
          <text:list>
            <text:list-item>
              <text:p text:style-name="P6">Summary </text:p>
              <text:list>
                <text:list-item>
                  <text:p text:style-name="P7">given two arrays merge them in place. Must merge from the back ie from largest element to smallest element. Make sure to account for the different array sizes. </text:p>
                </text:list-item>
              </text:list>
            </text:list-item>
            <text:list-item>
              <text:p text:style-name="P6">Notes</text:p>
              <text:list>
                <text:list-item>
                  <text:p text:style-name="P7">implementation from the back is key to maintain space complexity</text:p>
                </text:list-item>
              </text:list>
            </text:list-item>
          </text:list>
        </text:list-item>
        <text:list-item>
          <text:p text:style-name="P9">remove element 2</text:p>
          <text:list>
            <text:list-item>
              <text:p text:style-name="P6">Summary </text:p>
              <text:list>
                <text:list-item>
                  <text:p text:style-name="P7">solution 1: iterate through the array from the front and the back. if an invalid element is found write an element from the back to its position. Recheck the position. Continue until f &lt;= b. </text:p>
                </text:list-item>
                <text:list-item>
                  <text:p text:style-name="P7">solution 2: iterate through the array from the front and keep a pointer to a valid write position. If you see a valid value write it otherwise continue</text:p>
                </text:list-item>
              </text:list>
            </text:list-item>
            <text:list-item>
              <text:p text:style-name="P6">Notes</text:p>
            </text:list-item>
          </text:list>
        </text:list-item>
        <text:list-item>
          <text:p text:style-name="P9">remove duplicates from sorted array 3</text:p>
          <text:list>
            <text:list-item>
              <text:p text:style-name="P6">Summary</text:p>
              <text:list>
                <text:list-item>
                  <text:p text:style-name="P7">iterate from the front and keep a index pointer of the last valid position. If the current integer is not equal to the last valid integer, increment index pointer and write the integer. Otherwise continue.</text:p>
                </text:list-item>
              </text:list>
            </text:list-item>
            <text:list-item>
              <text:p text:style-name="P6">Notes: </text:p>
              <text:list>
                <text:list-item>
                  <text:p text:style-name="P7">be sure to account for off by one errors. I started at the second position as opposed to the first position to handle instantiating the first valid index. </text:p>
                </text:list-item>
              </text:list>
            </text:list-item>
          </text:list>
        </text:list-item>
        <text:list-item>
          <text:p text:style-name="P9">remove duplicates from sorted array two 4</text:p>
          <text:list>
            <text:list-item>
              <text:p text:style-name="P6">Summary </text:p>
              <text:list>
                <text:list-item>
                  <text:p text:style-name="P7">keep a k pointer and iterator pointer i. There are two cases. If k &lt; 2 you may write anything. Otherwise you must check that what you write is strictly greater than k-2 otherwise you will have more than 2 identical elements in a row. The k &lt; 2 case first keeps the k-2 case from an out of bounds error. </text:p>
                </text:list-item>
              </text:list>
            </text:list-item>
            <text:list-item>
              <text:p text:style-name="P6">Notes</text:p>
              <text:list>
                <text:list-item>
                  <text:p text:style-name="P7">tricky solution, remember short circuiting. You can change the -2 and &lt;2 to -n and &lt;n to make this problem work for any number of duplicates</text:p>
                </text:list-item>
              </text:list>
            </text:list-item>
          </text:list>
        </text:list-item>
        <text:list-item>
          <text:p text:style-name="P9">majority element 5</text:p>
          <text:list>
            <text:list-item>
              <text:p text:style-name="P6">Summary</text:p>
              <text:list>
                <text:list-item>
                  <text:p text:style-name="P7">iterate through the array and keep a dictionary of the count for each item. Keep track of the item with the most occurrences and you will find the majority element naturally through this process</text:p>
                </text:list-item>
              </text:list>
            </text:list-item>
            <text:list-item>
              <text:p text:style-name="P6">Notes</text:p>
              <text:list>
                <text:list-item>
                  <text:p text:style-name="P7">.get(key, default) can be useful when access updating a dictionary and you do not know if the key is present. .setdefault(key, value) can be used for setting the default value.</text:p>
                </text:list-item>
                <text:list-item>
                  <text:p text:style-name="P7">integers are valid as keys for python dictionaries</text:p>
                </text:list-item>
              </text:list>
            </text:list-item>
          </text:list>
        </text:list-item>
        <text:list-item>
          <text:p text:style-name="P9"><text:soft-page-break/>rotate array 6 </text:p>
          <text:list>
            <text:list-item>
              <text:p text:style-name="P6">Summary</text:p>
              <text:list>
                <text:list-item>
                  <text:p text:style-name="P7">solution 1: in place reverse array. Then reverse the first k elements and then the rest of the k to len(nums) elements</text:p>
                </text:list-item>
                <text:list-item>
                  <text:p text:style-name="P7">solution 2: rotate by 1 k times. bad time complexity</text:p>
                </text:list-item>
                <text:list-item>
                  <text:p text:style-name="P7">solution 3: only works for odd arrays. start at 0 index and jump through the array modulus len(array) carrying the previous value with you. </text:p>
                </text:list-item>
                <text:list-item>
                  <text:p text:style-name="P7">solution 4: make a new array and map every element to its new index with offset mod len(array)</text:p>
                </text:list-item>
              </text:list>
            </text:list-item>
            <text:list-item>
              <text:p text:style-name="P6">Notes: </text:p>
              <text:list>
                <text:list-item>
                  <text:p text:style-name="P7">the reversing trick was very clever. Try to think of things like these when solving problems</text:p>
                </text:list-item>
              </text:list>
            </text:list-item>
          </text:list>
        </text:list-item>
        <text:list-item>
          <text:p text:style-name="P9">game of life 7</text:p>
          <text:list>
            <text:list-item>
              <text:p text:style-name="P6">Summary: </text:p>
              <text:list>
                <text:list-item>
                  <text:p text:style-name="P7">for each tile iterate through and set its position based on the supplied rules. To do this inplace, use 2 and 3 to represent dead -&gt; alive and alive -&gt; dead cells respectively. swap all 2s and 3s to their correct state after all updates have been completed. </text:p>
                </text:list-item>
              </text:list>
            </text:list-item>
            <text:list-item>
              <text:p text:style-name="P6">Notes:</text:p>
              <text:list>
                <text:list-item>
                  <text:p text:style-name="P7">the 2 and 3 trick is very smart. Keep in mind that you can edit insertions in place to hold more information than just a number. </text:p>
                </text:list-item>
                <text:list-item>
                  <text:p text:style-name="P7">be sure to catch all the edge cases for checking the neighbors of a square</text:p>
                </text:list-item>
              </text:list>
            </text:list-item>
          </text:list>
        </text:list-item>
        <text:list-item>
          <text:p text:style-name="P5"><text:span text:style-name="T1">best time to buy and sell stock 8</text:span></text:p>
          <text:list>
            <text:list-item>
              <text:p text:style-name="P6">Summary: </text:p>
              <text:list>
                <text:list-item>
                  <text:p text:style-name="P7">Solution1: O(n^2), simply check every permutation of two elements from the set for its max value and return it. </text:p>
                </text:list-item>
                <text:list-item>
                  <text:p text:style-name="P7">Solution2: O(n), observe that every time you see a new minimum value you can restart your check for a new maximum profit. This is because if you see a new maximum value, the distance between the new maximum and new minimum will always be greater than the old minimum and new maximum. Therefore you must keep track of the minimum value and max profit while you iterate once through the array</text:p>
                </text:list-item>
              </text:list>
            </text:list-item>
            <text:list-item>
              <text:p text:style-name="P6">Notes: </text:p>
            </text:list-item>
          </text:list>
        </text:list-item>
        <text:list-item>
          <text:p text:style-name="P9">best time to buy and sell stock two 9</text:p>
          <text:list>
            <text:list-item>
              <text:p text:style-name="P6">Summary: </text:p>
              <text:list>
                <text:list-item>
                  <text:p text:style-name="P7">solution: simply sum all of the values of every local max - local min. follow the same solution as best time to buy and sell stock but when the next value is lower than the previous add your max profit to a total profit tally and reset your min value to the local minimum. </text:p>
                </text:list-item>
              </text:list>
            </text:list-item>
            <text:list-item>
              <text:p text:style-name="P6">Notes: </text:p>
              <text:list>
                <text:list-item>
                  <text:p text:style-name="P7">make sure to add the final max profit to total profit before returning</text:p>
                </text:list-item>
              </text:list>
            </text:list-item>
          </text:list>
        </text:list-item>
        <text:list-item>
          <text:p text:style-name="P9">jump game 10</text:p>
          <text:list>
            <text:list-item>
              <text:p text:style-name="P6">Summary: </text:p>
              <text:list>
                <text:list-item>
                  <text:p text:style-name="P7"><text:soft-page-break/>Solution1: iterate through the array. If you hit a zero, iterate through all elements below it and see if any of the jumps can overtake the 0 or the array. If not return false otherwise continue. </text:p>
                </text:list-item>
                <text:list-item>
                  <text:p text:style-name="P7">Solution2: iterate through the array and keep track of the max distance you can travel. If at any point you hit a zero and your max distance is equal to the 0 jump index return false. if max distance is greater or equal to last index return true. include a base case for length 1 arrays. </text:p>
                </text:list-item>
                <text:list-item>
                  <text:p text:style-name="P7">solution3: iterate through the array and keep track of the max distance you can travel. If at any point the max distance is less than the current index return false. if max distance is greater or equal to last index return true. </text:p>
                </text:list-item>
              </text:list>
            </text:list-item>
            <text:list-item>
              <text:p text:style-name="P6">Notes: </text:p>
              <text:list>
                <text:list-item>
                  <text:p text:style-name="P7">after you finish a solution take a second to make it cleaner. check for a more general condition. This will help lateral thinking.</text:p>
                </text:list-item>
              </text:list>
            </text:list-item>
          </text:list>
        </text:list-item>
        <text:list-item>
          <text:p text:style-name="P9">jump game two 11</text:p>
          <text:list>
            <text:list-item>
              <text:p text:style-name="P6">Solution: </text:p>
              <text:list>
                <text:list-item>
                  <text:p text:style-name="P7">iterate through windows which are defined as the maximum distance you can jump from your current position. The first window is the size of jumps[0]. Find the max distance possible in your given window and when you reach the end of the window (cur_jmp_end == i) set the next jump end to max distance. increment the jump counter whenever you reset max distance.</text:p>
                </text:list-item>
              </text:list>
            </text:list-item>
          </text:list>
        </text:list-item>
        <text:list-item>
          <text:p text:style-name="P9">H-index 12</text:p>
          <text:list>
            <text:list-item>
              <text:p text:style-name="P6">Solution: </text:p>
              <text:list>
                <text:list-item>
                  <text:p text:style-name="P7">Sort the array. iterate from front to back. at each position i if the remaining number of papers &lt;= the current citation amount, return the remaining number of papers. If this condition never occurs the h-index is just 0. </text:p>
                </text:list-item>
              </text:list>
            </text:list-item>
            <text:list-item>
              <text:p text:style-name="P6">Notes:</text:p>
              <text:list>
                <text:list-item>
                  <text:p text:style-name="P7">this solution only works because the array is sorted so the length of the sub array you are currently at is the number of papers with citations &gt;= the current citation count. Thus if the current citation amount is greater than the remaining papers you immediately get your h index and return</text:p>
                </text:list-item>
              </text:list>
            </text:list-item>
          </text:list>
        </text:list-item>
        <text:list-item>
          <text:p text:style-name="P9">product of array except self</text:p>
          <text:list>
            <text:list-item>
              <text:p text:style-name="P6">Solution: </text:p>
              <text:list>
                <text:list-item>
                  <text:p text:style-name="P7">At each position, the value stored at the given index i is the product of the product of the prefix values (the values before i) and the suffix values (the values after i). Therefore, you instantiate a result array to all 1s and iterate through the list from the front and the back. At each step you compute the prefix or suffix respectively and then multiply the corresponding output index by this value. </text:p>
                </text:list-item>
              </text:list>
            </text:list-item>
            <text:list-item>
              <text:p text:style-name="P6">Note: </text:p>
              <text:list>
                <text:list-item>
                  <text:p text:style-name="P7">another solution could be to take the product of the entire array and then divide each position by the number stored at i. Division was strictly prohibited but I still think this is a cool idea</text:p>
                </text:list-item>
              </text:list>
            </text:list-item>
          </text:list>
        </text:list-item>
        <text:list-item>
          <text:p text:style-name="P9"><text:soft-page-break/>insert delete getRandom O(1) 14</text:p>
          <text:list>
            <text:list-item>
              <text:p text:style-name="P6">Solution: </text:p>
              <text:list>
                <text:list-item>
                  <text:p text:style-name="P7">maintain a dictionary for O(1) insertion and deletion and an array for O(1) random lookup. to insert simply append the value to the end of the array and set the dictionary val to its index. to delete there are three cases</text:p>
                  <text:list>
                    <text:list-item>
                      <text:p text:style-name="P8">if there is only 1 value simply instantiate a new empty array and dictionary</text:p>
                    </text:list-item>
                    <text:list-item>
                      <text:p text:style-name="P8">if the value to remove is at the pack of the array simply pop it from the array and the dictionary</text:p>
                    </text:list-item>
                    <text:list-item>
                      <text:p text:style-name="P8">if the value to remove is in the middle of the array, pop it and retain its index. pop the value from the back of the array and place it in the old items index slot. Set this item's value to its new index in the dictionary. </text:p>
                    </text:list-item>
                  </text:list>
                </text:list-item>
              </text:list>
            </text:list-item>
            <text:list-item>
              <text:p text:style-name="P6">Notes: </text:p>
              <text:list>
                <text:list-item>
                  <text:p text:style-name="P7">can use random module and datastructures for this problem</text:p>
                </text:list-item>
              </text:list>
            </text:list-item>
          </text:list>
        </text:list-item>
        <text:list-item>
          <text:p text:style-name="P9">gas station 15</text:p>
          <text:list>
            <text:list-item>
              <text:p text:style-name="P6">Solution:</text:p>
              <text:list>
                <text:list-item>
                  <text:p text:style-name="P7">There is a solution if and only if sum(gas) &gt;= sum(cost). If this condition is met you need to iterate through the given arrays and keep track of your tank. If your tank is ever negative, reset your start index to the index after the empty tank square. if you can make it from start index to the end (start index is not necessarily start of the array) then that start index is your solution. notice because there is a solution, being able to make it from start to the end implies that the prefix before start index is valid. </text:p>
                </text:list-item>
              </text:list>
            </text:list-item>
            <text:list-item>
              <text:p text:style-name="P6">Notes: </text:p>
              <text:list>
                <text:list-item>
                  <text:p text:style-name="P7">Greedy algorithms: at each step you take the most valuable step and never look back. These allow for optimizations because they reduce the total amount of cases and eliminate swathes of invalid combinations at each step. Look for these patterns. </text:p>
                </text:list-item>
              </text:list>
            </text:list-item>
          </text:list>
        </text:list-item>
        <text:list-item>
          <text:p text:style-name="P9">candy</text:p>
          <text:list>
            <text:list-item>
              <text:p text:style-name="P6">Solution</text:p>
              <text:list>
                <text:list-item>
                  <text:p text:style-name="P7">The key insight for this problem is that you must compute candy values from the left and the right and sum the maximum of these values throughout the two arrays. Going from the left the current child must receive 1 greater candy than its left neighbor if it has a higher priority otherwise it receives 1 candy. The same logic holds for the right iteration. Finally, we see the real amount of candy is the max of the left and right candies at any position because the maximum satisfies both the left and the right constraints. Therefore the final solution is the sum of the maximum of the left and right candy values at each index i.</text:p>
                </text:list-item>
              </text:list>
            </text:list-item>
            <text:list-item>
              <text:p text:style-name="P6">Notes: </text:p>
              <text:list>
                <text:list-item>
                  <text:p text:style-name="P7">the left and right pattern is very powerful as can be seen in the next problem</text:p>
                </text:list-item>
              </text:list>
            </text:list-item>
          </text:list>
        </text:list-item>
        <text:list-item>
          <text:p text:style-name="P9">trapping rain water</text:p>
          <text:list>
            <text:list-item>
              <text:p text:style-name="P6"><text:soft-page-break/>Solution: </text:p>
              <text:list>
                <text:list-item>
                  <text:p text:style-name="P7">the key insight of this problem is calculating the possible water coming from the left and right and then summing the minimum of these values. Coming from either the left or the right you start with a local maximum of 0. Every time you find a larger value you retain this maximum. The potential water at each step is the difference between the ith height and the maximum. </text:p>
                </text:list-item>
              </text:list>
            </text:list-item>
          </text:list>
        </text:list-item>
        <text:list-item>
          <text:p text:style-name="P9">roman to integer</text:p>
          <text:list>
            <text:list-item>
              <text:p text:style-name="P6">Solution: </text:p>
              <text:list>
                <text:list-item>
                  <text:p text:style-name="P7">use a dictionary to map numerals to their respective values. Iterate from left ro right and add the value of the ith numeral to a sum or subtract it if the ith numeral is strictly less than the i+1th numeral</text:p>
                </text:list-item>
              </text:list>
            </text:list-item>
            <text:list-item>
              <text:p text:style-name="P6">Notes: </text:p>
              <text:list>
                <text:list-item>
                  <text:p text:style-name="P7">using a dictionary instead of a case statement was smart</text:p>
                </text:list-item>
                <text:list-item>
                  <text:p text:style-name="P7">python has case statements made with the key word match</text:p>
                </text:list-item>
              </text:list>
            </text:list-item>
          </text:list>
        </text:list-item>
        <text:list-item>
          <text:p text:style-name="P9">integer to roman</text:p>
          <text:list>
            <text:list-item>
              <text:p text:style-name="P6">Solution</text:p>
              <text:list>
                <text:list-item>
                  <text:p text:style-name="P7">We will follow a greedy algorithm to solve this problem. Create a dictionary of all the possible values including subtractive values (ie 900, 90 4) and there mapping to numerals. Iterate through these values from greatest to smallest and use divmod to reduce the starting number by factors of your current value at each step. append count times your current value at each step to your result string</text:p>
                </text:list-item>
              </text:list>
            </text:list-item>
          </text:list>
        </text:list-item>
        <text:list-item>
          <text:p text:style-name="P9">length of last word</text:p>
          <text:list>
            <text:list-item>
              <text:p text:style-name="P6">Solution: </text:p>
              <text:list>
                <text:list-item>
                  <text:p text:style-name="P7">Strip to remove trailing and leading white space. split on blanks. return the length of the stripped last word.</text:p>
                </text:list-item>
              </text:list>
            </text:list-item>
            <text:list-item>
              <text:p text:style-name="P6">Notes:</text:p>
              <text:list>
                <text:list-item>
                  <text:p text:style-name="P7">very easy with python built ins</text:p>
                </text:list-item>
              </text:list>
            </text:list-item>
          </text:list>
        </text:list-item>
        <text:list-item>
          <text:p text:style-name="P9">longest common prefix</text:p>
          <text:list>
            <text:list-item>
              <text:p text:style-name="P6">Solution: </text:p>
              <text:list>
                <text:list-item>
                  <text:p text:style-name="P7">sort the list in order of word length. Create a ordered intersection function that returns the longest common prefix of two words. Iterate through your sorted array and take the indexed intersection between the current common prefix and the current word. The first common prefix is simply the first word. </text:p>
                </text:list-item>
              </text:list>
            </text:list-item>
            <text:list-item>
              <text:p text:style-name="P6">Notes: </text:p>
              <text:list>
                <text:list-item>
                  <text:p text:style-name="P7">sorting is not strictly necessary but is nice. Could remove sorting for a lower time complexity. </text:p>
                </text:list-item>
              </text:list>
            </text:list-item>
          </text:list>
        </text:list-item>
        <text:list-item>
          <text:p text:style-name="P9">reverse words in string</text:p>
          <text:list>
            <text:list-item>
              <text:p text:style-name="P6">Strip to remove trailing and leading white space. Split on blanks. remove empty words. Reverse and join list</text:p>
            </text:list-item>
          </text:list>
        </text:list-item>
        <text:list-item>
          <text:p text:style-name="P9">find the index of the first occurrence in a string</text:p>
          <text:list>
            <text:list-item>
              <text:p text:style-name="P6">Use a sliding window and checking for equality with your given needle. If found <text:soft-page-break/>return index otherwise -1 after full iteration. </text:p>
            </text:list-item>
          </text:list>
        </text:list-item>
        <text:list-item>
          <text:p text:style-name="P9">zigzag conversion</text:p>
          <text:list>
            <text:list-item>
              <text:p text:style-name="P6">Solution: </text:p>
              <text:list>
                <text:list-item>
                  <text:p text:style-name="P7">In order to solve this problem you must iterate through the first numRows elements of the array. At each element you append the elements for the current row of the zigzag. There are two cases for this: </text:p>
                  <text:list>
                    <text:list-item>
                      <text:p text:style-name="P8">Case 1: you are at the first or last position. In this case you simply move by ((2 * numRows) -2) to get the next element. Draw out the diagram to see this in action</text:p>
                    </text:list-item>
                    <text:list-item>
                      <text:p text:style-name="P8">Case 2: you are in a middle index. In this case you have two letters to worry about. The first letter follows the same approach as case 1. The second letter is appended after the first letter iteratively and the gap between letters is the same. The starting position of this letter is determined by the equation give in the solution</text:p>
                    </text:list-item>
                  </text:list>
                </text:list-item>
              </text:list>
            </text:list-item>
            <text:list-item>
              <text:p text:style-name="P6">Notes</text:p>
              <text:list>
                <text:list-item>
                  <text:p text:style-name="P7">These equations are a little cooked. Drawing it out helped a lot. Def need to review to keep it fresh</text:p>
                </text:list-item>
              </text:list>
            </text:list-item>
          </text:list>
        </text:list-item>
        <text:list-item>
          <text:p text:style-name="P9">text justification</text:p>
          <text:list>
            <text:list-item>
              <text:p text:style-name="P6">Solution: </text:p>
              <text:list>
                <text:list-item>
                  <text:p text:style-name="P7">The approach is to iterate through each word one at a time. Add this word to a current results and assert that the number of chars in this list (including mandatory 1 space) is less that numCols. If it would be greater justify the text and append to result. distribute spaces in a round robbin manner. The last line will never justify due to the loop guard in the solution. use pythons .ljustify() to perform the final left justification</text:p>
                </text:list-item>
              </text:list>
            </text:list-item>
            <text:list-item>
              <text:p text:style-name="P6">Notes</text:p>
              <text:list>
                <text:list-item>
                  <text:p text:style-name="P7">The trick here is to have a case for justifying the text as opposed to a case for not justifying the text.</text:p>
                </text:list-item>
              </text:list>
            </text:list-item>
          </text:list>
        </text:list-item>
        <text:list-item>
          <text:p text:style-name="P9">valid palindrome</text:p>
          <text:list>
            <text:list-item>
              <text:p text:style-name="P6">Solution: This is a two pointer problem. Simply set a pointer to the back and front and iterate until they cross. If both current chars are valid (alphanumeric and not spaces) but do not equal each return false. If there are no bad positions return true. </text:p>
            </text:list-item>
            <text:list-item>
              <text:p text:style-name="P6">Notes: very simple</text:p>
            </text:list-item>
          </text:list>
        </text:list-item>
        <text:list-item>
          <text:p text:style-name="P9">isomorphic string</text:p>
          <text:list>
            <text:list-item>
              <text:p text:style-name="P6">Solution: </text:p>
              <text:list>
                <text:list-item>
                  <text:p text:style-name="P7">FIrst assert that the length of the two strings are the same. Then maintain a taken and map set and dictionary. At every step attempt to map the current char in word 1 to the current char in word 2. if the current word 1 char is unmapped but the char in word 2 is taken return false. If the current char in word 1 is taken and the current char in word 2 is not its map return false. </text:p>
                </text:list-item>
              </text:list>
            </text:list-item>
            <text:list-item>
              <text:p text:style-name="P6">Notes: </text:p>
              <text:list>
                <text:list-item>
                  <text:p text:style-name="P7"><text:soft-page-break/>you must make that no char maps to multiple chars. This is why you must check if a letter in word 2 is taken before trying to map it. </text:p>
                </text:list-item>
              </text:list>
            </text:list-item>
          </text:list>
        </text:list-item>
        <text:list-item>
          <text:p text:style-name="P9">two sum</text:p>
          <text:list>
            <text:list-item>
              <text:p text:style-name="P6">Iterate through the array and subtract each element from target as you go. Maintain a dictionary mapping these differences to indices. If at any point you find a number that has been mapped to an index return the mapped index and current index. </text:p>
            </text:list-item>
          </text:list>
        </text:list-item>
        <text:list-item>
          <text:p text:style-name="P9">word pattern</text:p>
          <text:list>
            <text:list-item>
              <text:p text:style-name="P6">Solution: The goal of this problem is to establish a bijection between the char string and the words. To do this you must maintain a map from chars to strings and strings to chars. First assert that there are an equal number of chars and words. Second iterate through the chars and words mapping them to eachother if there are not mapped. At any point, if the mappings of your current char and word are not equivalent return false. </text:p>
              <text:list>
                <text:list-item>
                  <text:p text:style-name="P10"/>
                </text:list-item>
              </text:list>
            </text:list-item>
          </text:list>
        </text:list-item>
        <text:list-item>
          <text:p text:style-name="P9">is subsequence</text:p>
          <text:list>
            <text:list-item>
              <text:p text:style-name="P6">Solution: </text:p>
              <text:list>
                <text:list-item>
                  <text:p text:style-name="P7">First assert that the string to search is longer than the subsequence to find. Then, simply iterate through the given string to search and increment a pointer to a char in the target subsequence every time you find one of its characters. If you find all characters ie your subsequence pointer is greater than or equal to the length of the subsequence return true. </text:p>
                </text:list-item>
              </text:list>
            </text:list-item>
          </text:list>
        </text:list-item>
        <text:list-item>
          <text:p text:style-name="P9">two sum two</text:p>
          <text:list>
            <text:list-item>
              <text:p text:style-name="P6">Solution: Because the array is sorted you can follow a two pointer approach. increment and decrement a lo and hi pointer respectively in order to search for target. If your current sum is less than <text:s/>target increment lo otherwise increment hi. At each step check if you have found target. If you never find target return false.</text:p>
            </text:list-item>
          </text:list>
        </text:list-item>
        <text:list-item>
          <text:p text:style-name="P9">three sum</text:p>
          <text:list>
            <text:list-item>
              <text:p text:style-name="P6">Solution: </text:p>
              <text:list>
                <text:list-item>
                  <text:p text:style-name="P7">To solve this we will have to turn the 3sum problem into n sorted 2sum problems. Our goal is to find all sets of 3 numbers that sum to 0. First sort the input array. Then iterate through it. At each step search the remaining portion of the array for the two sum solution to -nums[i]. This ensures that the sum of three elements is equal to 0. If this is found append a list of these elements to your result. Note that when you find a match you must keep looking for the rest of the matches. At each iteration you must also remove all duplicates with while loops that increment and decrement lo and hi to avoid duplicates. </text:p>
                </text:list-item>
              </text:list>
            </text:list-item>
            <text:list-item>
              <text:p text:style-name="P6">Notes: </text:p>
              <text:list>
                <text:list-item>
                  <text:p text:style-name="P7">the target time complexity for this problem is O(n^2) which tripped me up at first.</text:p>
                </text:list-item>
                <text:list-item>
                  <text:p text:style-name="P7">we search the remaining array because otherwise you would find duplicates in the prefix array. Searching the suffix array avoids duplicates. </text:p>
                </text:list-item>
              </text:list>
            </text:list-item>
          </text:list>
        </text:list-item>
        <text:list-item>
          <text:p text:style-name="P9"><text:soft-page-break/>minimum size subarray</text:p>
          <text:list>
            <text:list-item>
              <text:p text:style-name="P6">Solution:</text:p>
              <text:list>
                <text:list-item>
                  <text:p text:style-name="P7">Our goal is to solve this problem in O(n) time. To do this we iterate through each position in the given array and keep track of the total sum of our given window at that position. At each position we shrink the window down to the smallest it can be and keep that length as our best length if it is the smallest length seen so far. If our length never changes then return 0. </text:p>
                </text:list-item>
              </text:list>
            </text:list-item>
            <text:list-item>
              <text:p text:style-name="P6">Notes: </text:p>
              <text:list>
                <text:list-item>
                  <text:p text:style-name="P7">keep this sliding window approach in mind. It is very successful but was a little tricky to conceptualize initially. </text:p>
                </text:list-item>
              </text:list>
            </text:list-item>
          </text:list>
        </text:list-item>
        <text:list-item>
          <text:p text:style-name="P9">length of longest substring</text:p>
          <text:list>
            <text:list-item>
              <text:p text:style-name="P6">Solution:</text:p>
              <text:list>
                <text:list-item>
                  <text:p text:style-name="P7">This solution is similar in vein to minimum size subarray. First you must maintain a set of the the chars in your subarray, then iterate through the array with a hi and lo pointer. If you ever find a duplicate element. reduce your window until there are no duplicates. After asserting uniqueness check the length of the subarray and store it if it is the longest yet seen. </text:p>
                </text:list-item>
              </text:list>
            </text:list-item>
            <text:list-item>
              <text:p text:style-name="P6">Notes: </text:p>
              <text:list>
                <text:list-item>
                  <text:p text:style-name="P7">The indices for these sliding window problems are the most difficult part</text:p>
                </text:list-item>
              </text:list>
            </text:list-item>
          </text:list>
        </text:list-item>
        <text:list-item>
          <text:p text:style-name="P9">substring with concatenation of all words</text:p>
          <text:list>
            <text:list-item>
              <text:p text:style-name="P6">Solution: </text:p>
              <text:list>
                <text:list-item>
                  <text:p text:style-name="P7"><text:s/>In order to solve this problem we must use a dictionary (hash map) to keep <text:s/>track of counts for our current words. We must establish a reference counts dictionary to compare our current counts dictionary against. We must then complete a sliding window problem at each start index determined by the length of the given words. The condition for our sliding window problem is our counts there are three cases: </text:p>
                  <text:list>
                    <text:list-item>
                      <text:p text:style-name="P8">our current word is invalid: we must reset counts and move the window to the word after the current window</text:p>
                    </text:list-item>
                    <text:list-item>
                      <text:p text:style-name="P8">the current word is valid and cur_counts &lt; word_counts: increment the count for our current word</text:p>
                    </text:list-item>
                    <text:list-item>
                      <text:p text:style-name="P8">the current word is valid a cur_counts &gt; word_counts: shrink the window from the left until the offending over occurring items count is less than or equal to the count in word_counts</text:p>
                    </text:list-item>
                  </text:list>
                </text:list-item>
              </text:list>
            </text:list-item>
          </text:list>
        </text:list-item>
      </text:list>
      <text:p text:style-name="P1">you must append a start index everytime the cur_counts is equal to word_counts</text:p>
      <text:list text:continue-numbering="true" text:style-name="WWNum1">
        <text:list-item>
          <text:list>
            <text:list-item>
              <text:p text:style-name="P6">Notes: </text:p>
              <text:list>
                <text:list-item>
                  <text:p text:style-name="P7">The core intuition of this problem is realising that the sliding window problem relates to a condition upon which we shrink or expand our given window. </text:p>
                </text:list-item>
              </text:list>
            </text:list-item>
          </text:list>
        </text:list-item>
        <text:list-item>
          <text:p text:style-name="P9">minimum window substring</text:p>
          <text:list>
            <text:list-item>
              <text:p text:style-name="P6">Solution: </text:p>
              <text:list>
                <text:list-item>
                  <text:p text:style-name="P7">For this solution we are again counting frequencies. Our window guard is <text:soft-page-break/>asserting that we have at least enough occurrences of each letter in our target string in our window. We may shrink our window as long as this is true. To start we must initialize a reference counts and a current counts dictionary and a have and need counter. We increment have whenever we get enough of 1 type of char in our window. At each hi step we increment out counter for the current char and then shrink the window if we have all the chars we need. We stop shrinking if have is strictly less than need. At the beginning of each shrink iteration, we save the current window string and length if it is the minimum length window seen so far. </text:p>
                </text:list-item>
              </text:list>
            </text:list-item>
            <text:list-item>
              <text:p text:style-name="P6">Notes:</text:p>
              <text:list>
                <text:list-item>
                  <text:p text:style-name="P7">This is a good template for many sliding window substring problems. The have vs need is a good way to keep track of all chars you need and stop shrinking your window when exactly one dips bellow the needed amount. </text:p>
                </text:list-item>
              </text:list>
            </text:list-item>
          </text:list>
        </text:list-item>
        <text:list-item>
          <text:p text:style-name="P9">Valid Sudoko: </text:p>
          <text:list>
            <text:list-item>
              <text:p text:style-name="P6">Solution1: </text:p>
              <text:list>
                <text:list-item>
                  <text:p text:style-name="P7">define functions to check every row and col and square. Only check squares on divisions of 3. This is madly inefficient but works</text:p>
                </text:list-item>
              </text:list>
            </text:list-item>
            <text:list-item>
              <text:p text:style-name="P6">Solution2: </text:p>
              <text:list>
                <text:list-item>
                  <text:p text:style-name="P7">use bitmasks or bool sets to keep track which numbers have been seen so far in all cols, squares and rows. If a number has been seen return false. </text:p>
                </text:list-item>
              </text:list>
            </text:list-item>
            <text:list-item>
              <text:p text:style-name="P6">Notes: </text:p>
              <text:list>
                <text:list-item>
                  <text:p text:style-name="P7">very easy solution</text:p>
                </text:list-item>
              </text:list>
            </text:list-item>
          </text:list>
        </text:list-item>
        <text:list-item>
          <text:p text:style-name="P9">spiral matrix</text:p>
          <text:list>
            <text:list-item>
              <text:p text:style-name="P6">Solution:</text:p>
              <text:list>
                <text:list-item>
                  <text:p text:style-name="P7">set a top bottom left and right variable. while the top and bottom do not overlap, traverse top (left to right) right (top to bottom) bottom (right to left) left (bottom to top). Remember to recheck your conditions on the second two traversals as the first two traversals may have changed your state to invalid. Yes this uses 4 for loops. No its not pretty </text:p>
                </text:list-item>
              </text:list>
            </text:list-item>
            <text:list-item>
              <text:p text:style-name="P6">Notes: </text:p>
              <text:list>
                <text:list-item>
                  <text:p text:style-name="P7">unpleasant solution. </text:p>
                </text:list-item>
              </text:list>
            </text:list-item>
          </text:list>
        </text:list-item>
        <text:list-item>
          <text:p text:style-name="P9">rotate image</text:p>
          <text:list>
            <text:list-item>
              <text:p text:style-name="P6">Solution: </text:p>
              <text:list>
                <text:list-item>
                  <text:p text:style-name="P7">similar to spiral matrix set top, bottom, left, and right variables. Rotate every element iteratively in the outside shell of the matrix and then shrink top, bottom, left and right. when doing this you must iterate through the values in the top array. swap these values and make sure to do correct array indexing. You will need a gap offset in the subtractive cases in order to adjust for the shrinking window. This gap is simply the current distance from your window right to the outside of the matrix. </text:p>
                </text:list-item>
              </text:list>
            </text:list-item>
            <text:list-item>
              <text:p text:style-name="P6">Notes: </text:p>
              <text:list>
                <text:list-item>
                  <text:p text:style-name="P7">be sure to notice that a gap offset is needed when subtracting (ie going backwards) in your rotation swaps. This gap prevents overshooting by <text:soft-page-break/>making sure 0 is always the first term subtracted. </text:p>
                </text:list-item>
              </text:list>
            </text:list-item>
          </text:list>
        </text:list-item>
        <text:list-item>
          <text:p text:style-name="P9">set matrix zeros</text:p>
          <text:list>
            <text:list-item>
              <text:p text:style-name="P6">Solution: </text:p>
              <text:list>
                <text:list-item>
                  <text:p text:style-name="P7">Simply scan the matrix and keep track of the zero values. Then set the row and col of each zero position to 0 after the fact</text:p>
                </text:list-item>
                <text:list-item>
                  <text:p text:style-name="P7">Simply scan the matrix and keep track of the rows and cols to zero using a set to avoid repeats. Then iterate through these sets and zero out each row and col. The use of sets will avoid repeats completely and improve runtime</text:p>
                </text:list-item>
              </text:list>
            </text:list-item>
            <text:list-item>
              <text:p text:style-name="P6">Notes:</text:p>
              <text:list>
                <text:list-item>
                  <text:p text:style-name="P7">the set idea is a good idea. </text:p>
                </text:list-item>
              </text:list>
            </text:list-item>
          </text:list>
        </text:list-item>
        <text:list-item>
          <text:p text:style-name="P9">ransom note</text:p>
          <text:list>
            <text:list-item>
              <text:p text:style-name="P6">Solution: </text:p>
              <text:list>
                <text:list-item>
                  <text:p text:style-name="P7">create a dictionary to count frequencies. iterate through the magazine and increment the counts of the respective chars. iterate through the ransomNote and decrement the respective chars. If the value of a char is ever negative return false otherwise return true</text:p>
                </text:list-item>
              </text:list>
            </text:list-item>
          </text:list>
        </text:list-item>
        <text:list-item>
          <text:p text:style-name="P9">valid anagram: </text:p>
          <text:list>
            <text:list-item>
              <text:p text:style-name="P6">Solution: </text:p>
              <text:list>
                <text:list-item>
                  <text:p text:style-name="P7">create two frequencies dictionaries, one for each word. Count the frequencies of each word and return whether they are equal to each other. </text:p>
                </text:list-item>
              </text:list>
            </text:list-item>
          </text:list>
        </text:list-item>
        <text:list-item>
          <text:p text:style-name="P9">happy number: </text:p>
          <text:list>
            <text:list-item>
              <text:p text:style-name="P6">Solution: </text:p>
              <text:list>
                <text:list-item>
                  <text:p text:style-name="P7">keep a set of numbers seen so far. Then while you havent seen the number you are currently on and your current number is not 1 perform the given transformation on it. Make sure to add your new number to your tracking set at every stage. </text:p>
                </text:list-item>
              </text:list>
            </text:list-item>
          </text:list>
        </text:list-item>
        <text:list-item>
          <text:p text:style-name="P9">group anagrams</text:p>
          <text:list>
            <text:list-item>
              <text:p text:style-name="P6">Solution: </text:p>
              <text:list>
                <text:list-item>
                  <text:p text:style-name="P7">iterate through the list of words. At each step create a frequency map. Use a dict to map these frequency maps to their words. Note that the key used for this dict must be a tuple of the sorted frequency map based on alphabetic order. This ensures the key is hashable. simply add words to their respective sets and then return the sets. </text:p>
                </text:list-item>
              </text:list>
            </text:list-item>
            <text:list-item>
              <text:p text:style-name="P6">Notes</text:p>
              <text:list>
                <text:list-item>
                  <text:p text:style-name="P7">.append() modifies in place and returns None, therefore assigning to a dictionary from a .append statement is an error</text:p>
                </text:list-item>
                <text:list-item>
                  <text:p text:style-name="P7">.setdefault() is used for when default values are stack allocated and can be modified in place</text:p>
                </text:list-item>
              </text:list>
            </text:list-item>
          </text:list>
        </text:list-item>
        <text:list-item>
          <text:p text:style-name="P9">longest consecutive sequence</text:p>
          <text:list>
            <text:list-item>
              <text:p text:style-name="P6">Solution: </text:p>
              <text:list>
                <text:list-item>
                  <text:p text:style-name="P7">The key realization is that all you need to do to solve this problem is find the starting points and then increment them until there value is no longer <text:soft-page-break/>in the provided list. To do this, create a set of the input array. Iterate the set and look for starting points which are defined by elements e where e-1 is not in the num set. If a starting point is found iterate up as far as possible until the next number is not in the num_set and return the best length</text:p>
                </text:list-item>
              </text:list>
            </text:list-item>
            <text:list-item>
              <text:p text:style-name="P6">Notes: </text:p>
              <text:list>
                <text:list-item>
                  <text:p text:style-name="P7">think of starting points</text:p>
                </text:list-item>
              </text:list>
            </text:list-item>
          </text:list>
        </text:list-item>
        <text:list-item>
          <text:p text:style-name="P9">contains duplicates two: </text:p>
          <text:list>
            <text:list-item>
              <text:p text:style-name="P6">Solution: </text:p>
              <text:list>
                <text:list-item>
                  <text:p text:style-name="P7">maintain a dictionary of every number seen so far and the indices it was seen at. Iterate through your list and update you index dictionary accordingly. At each iteration, if you have seen the number before compare its index with the stored indices. If abs(i-j) &lt;= k return true. Return false if you do not find such a pair</text:p>
                </text:list-item>
              </text:list>
            </text:list-item>
          </text:list>
        </text:list-item>
        <text:list-item>
          <text:p text:style-name="P9">summary ranges</text:p>
          <text:list>
            <text:list-item>
              <text:p text:style-name="P6">Solution: </text:p>
              <text:list>
                <text:list-item>
                  <text:p text:style-name="P7">Simply iterate through the array and at each step check if the current number is one greater than the previous number. if not append a range. </text:p>
                </text:list-item>
              </text:list>
            </text:list-item>
            <text:list-item>
              <text:p text:style-name="P6">Notes: </text:p>
              <text:list>
                <text:list-item>
                  <text:p text:style-name="P7">there are cleaner solutions then yours. A good exercise for later or the reader!</text:p>
                </text:list-item>
              </text:list>
            </text:list-item>
          </text:list>
        </text:list-item>
        <text:list-item>
          <text:p text:style-name="P9">merge intervals</text:p>
          <text:list>
            <text:list-item>
              <text:p text:style-name="P6">Solution:</text:p>
              <text:list>
                <text:list-item>
                  <text:p text:style-name="P7"><text:s/>This solution relies on sorting the intervals by start time. Maintain a results array where the last element is the interval you are currently merging. Because you sorted the input array you know the start time of your current interval is always less than or equal to the start time of the next interval. Thus at each step, all you must check is that the current end time is greater then the next start time and set the new end time to the max of the current end time and the next end time. </text:p>
                </text:list-item>
              </text:list>
            </text:list-item>
            <text:list-item>
              <text:p text:style-name="P6">Notes: <text:tab/></text:p>
              <text:list>
                <text:list-item>
                  <text:p text:style-name="P7">in general it is impractical to do this without sorting</text:p>
                </text:list-item>
              </text:list>
            </text:list-item>
          </text:list>
        </text:list-item>
        <text:list-item>
          <text:p text:style-name="P9">minimum arrows to pop balloons</text:p>
          <text:list>
            <text:list-item>
              <text:p text:style-name="P6">Solution:</text:p>
              <text:list>
                <text:list-item>
                  <text:p text:style-name="P7"><text:s/>Sort the array by start times. The key intuition of this solution is realising that after sorting, you can reduce each interval to only its intersecting portion with the next interval. Because it is sorted by start time you maintain control over the <text:s/>interval and know that the next interval can either be merged or not. Maintain a list of all the intersecting regions and return the length of this list at the end. </text:p>
                </text:list-item>
              </text:list>
            </text:list-item>
            <text:list-item>
              <text:p text:style-name="P6">Notes: </text:p>
              <text:list>
                <text:list-item>
                  <text:p text:style-name="P7">sorting seems to be the way to go with interval problems. Always consider a sorting solution when trying to solve one of these. </text:p>
                </text:list-item>
              </text:list>
            </text:list-item>
          </text:list>
        </text:list-item>
        <text:list-item>
          <text:p text:style-name="P9">valid parenthesis</text:p>
          <text:list>
            <text:list-item>
              <text:p text:style-name="P6"><text:soft-page-break/>Solution: </text:p>
              <text:list>
                <text:list-item>
                  <text:p text:style-name="P7">maintain a stack where at each step of iteration through your given parenthesis string s, you take the current parenthesis see if it matches the pop of the stack and if it does pop the top of the stack. If it does not push the current parenthesis to the stack. If your stack is empty at the end the parenthesis are valid. </text:p>
                </text:list-item>
              </text:list>
            </text:list-item>
          </text:list>
        </text:list-item>
        <text:list-item>
          <text:p text:style-name="P9">simplify path</text:p>
          <text:list>
            <text:list-item>
              <text:p text:style-name="P6">Solution: </text:p>
              <text:list>
                <text:list-item>
                  <text:p text:style-name="P7">Split your input string by ‘/’ then iterate through the resulting list making sure to skip empty strings that result from multi slash sequences such as “///”. At each step check for ‘..’ and ‘.’. If you find a ‘.’ continue. If you find a ‘..’ pop the previous directory from your stack if the stack is not empty otherwise continue. If a valid directory is found, simply push it to the stack. </text:p>
                </text:list-item>
              </text:list>
            </text:list-item>
            <text:list-item>
              <text:p text:style-name="P6">Notes: </text:p>
              <text:list>
                <text:list-item>
                  <text:p text:style-name="P7">must prepend a ‘/’ to your solution for the root ‘/’</text:p>
                </text:list-item>
              </text:list>
            </text:list-item>
          </text:list>
        </text:list-item>
        <text:list-item>
          <text:p text:style-name="P9">min stack</text:p>
          <text:list>
            <text:list-item>
              <text:p text:style-name="P6">Solution: </text:p>
              <text:list>
                <text:list-item>
                  <text:p text:style-name="P7">This one is easy. Just maintain two stacks, the traditional stack and the min_element stack. If the element you are pushing to the stack is less than or equal to the current min element push it to the min element stack. Likewise if the element you are popping is the min element pop it from the min element stack as well. </text:p>
                </text:list-item>
              </text:list>
            </text:list-item>
            <text:list-item>
              <text:p text:style-name="P6">Notes: </text:p>
              <text:list>
                <text:list-item>
                  <text:p text:style-name="P7">make sure to use &lt;= to check for min elements as you must append to min_element stack if the two elements are equal in order to maintain your minstack when performing pop operations. </text:p>
                </text:list-item>
              </text:list>
            </text:list-item>
          </text:list>
        </text:list-item>
        <text:list-item>
          <text:p text:style-name="P9">evaluate reverse polish notation</text:p>
          <text:list>
            <text:list-item>
              <text:p text:style-name="P6">Solution: </text:p>
              <text:list>
                <text:list-item>
                  <text:p text:style-name="P7">Also kinda easy. Keep in mind that all expressions given are valid so you do not need to check for invalid notation. simply push values until you find an operator. When you find an operator pop the two values needed and push the combined values back to the stack. Return the final value at the end. </text:p>
                </text:list-item>
              </text:list>
            </text:list-item>
          </text:list>
        </text:list-item>
      </text:list>
      <text:p text:style-name="P14"/>
      <text:p text:style-name="P15"/>
      <text:p text:style-name="P15">Basic Calculator</text:p>
      <text:p text:style-name="P15">linked list cycle</text:p>
      <text:p text:style-name="P15">add two numbers</text:p>
      <text:p text:style-name="P15">merge sorted list</text:p>
      <text:p text:style-name="P15"/>
      <text:p text:style-name="P15"/>
      <text:p text:style-name="P3">RESOURCES</text:p>
      <text:list text:style-name="WWNum3">
        <text:list-item>
          <text:p text:style-name="P11">credentials</text:p>
          <text:list>
            <text:list-item>
              <text:p text:style-name="P12"><text:soft-page-break/>clem3nti</text:p>
            </text:list-item>
            <text:list-item>
              <text:p text:style-name="P12">20(Jobs*)27</text:p>
            </text:list-item>
          </text:list>
        </text:list-item>
      </text:list>
      <text:p text:style-name="P4">APPROACH: </text:p>
      <text:list text:style-name="WWNum2">
        <text:list-item>
          <text:p text:style-name="P13">Do at least 3 problems a day</text:p>
        </text:list-item>
        <text:list-item>
          <text:p text:style-name="P13">after 25 problems, do a test which is 6 random problems that you have already solve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6"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7"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25"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6-01T22:05:45.324675993</dc:date>
    <meta:editing-duration>PT20M13S</meta:editing-duration>
    <meta:editing-cycles>2</meta:editing-cycles>
    <meta:document-statistic meta:table-count="0" meta:image-count="0" meta:object-count="0" meta:page-count="13" meta:paragraph-count="263" meta:word-count="4923" meta:character-count="26407" meta:non-whitespace-character-count="21871"/>
  </office:meta>
</office:document-meta>
</file>